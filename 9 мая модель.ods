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table" style:master-page-name="Standard" style:name="Table1">
      <co:linked-style style-name="Cell1"/>
      <style:table-properties style:width="566.9294pt" table:display="true"/>
    </style:style>
    <style:style style:family="table-cell" style:master-page-name="Standard" style:name="Cell1">
      <co:linked-style style-name="Table1"/>
    </style:style>
    <style:style style:family="table-column" style:name="Col2">
      <style:table-column-properties style:column-width="64.0063pt" style:use-optimal-column-width="true"/>
    </style:style>
    <style:style style:family="table-column" style:name="Col1">
      <style:table-column-properties style:column-width="28.3465pt" style:use-optimal-column-width="false"/>
    </style:style>
    <style:style style:family="table-row" style:name="Row2">
      <style:table-row-properties style:min-row-height="14.9953pt" style:row-height="14.9953pt" style:use-optimal-row-height="true"/>
    </style:style>
    <style:style style:family="table-row" style:name="Row1">
      <style:table-row-properties style:row-height="28.3465pt" style:use-optimal-row-height="false"/>
    </style:style>
    <style:style style:family="table-cell" style:name="Cell7" style:parent-style-name="Text_cl"/>
    <style:style style:family="table-cell" style:name="Cell2" style:parent-style-name="default_cl"/>
    <style:style style:family="table-cell" style:name="Cell6" style:parent-style-name="Text_cl">
      <style:table-cell-properties fo:border-bottom="0.75pt solid #000000" fo:border-left="0.75pt solid #000000" fo:border-right="0.75pt solid #000000" fo:border-top="0.75pt solid #000000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orphans="2" fo:text-align="center" fo:widows="2"/>
      <style:text-properties fo:font-style="normal" fo:font-weight="normal" fo:text-shadow="none" style:font-relief="none" style:font-style-asian="normal" style:font-style-complex="normal" style:font-weight-asian="normal" style:font-weight-complex="normal" style:text-line-through-style="none" style:text-line-through-type="none" style:text-underline-style="none"/>
    </style:style>
    <style:style style:family="table-cell" style:name="Cell3" style:parent-style-name="Text_cl">
      <style:table-cell-properties fo:background-color="#BBBBBB" fo:border-bottom="0.75pt solid #000000" fo:border-left="0.75pt solid #000000" fo:border-right="0.75pt solid #000000" fo:border-top="0.75pt solid #000000">
        <co:background-theme-color>
          <value>
            <rgba>BBBBBB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style="normal" fo:font-weight="normal" fo:text-shadow="none" style:font-relief="none" style:font-style-asian="normal" style:font-style-complex="normal" style:font-weight-asian="normal" style:font-weight-complex="normal" style:text-line-through-style="none" style:text-line-through-type="none" style:text-underline-style="none"/>
    </style:style>
    <style:style style:family="table-cell" style:name="Cell4" style:parent-style-name="Text_cl">
      <style:table-cell-properties fo:background-color="#BBBBBB" fo:border-bottom="0.75pt solid #000000" fo:border-left="0.75pt solid #000000" fo:border-right="0.75pt solid #000000" fo:border-top="0.75pt solid #000000" style:repeat-content="false" style:text-align-source="fix">
        <co:background-theme-color>
          <value>
            <rgba>BBBBBB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orphans="2" fo:text-align="center" fo:widows="2"/>
      <style:text-properties fo:font-style="normal" fo:font-weight="normal" fo:text-shadow="none" style:font-relief="none" style:font-style-asian="normal" style:font-style-complex="normal" style:font-weight-asian="normal" style:font-weight-complex="normal" style:text-line-through-style="none" style:text-line-through-type="none" style:text-underline-style="none"/>
    </style:style>
    <style:style co:quote-prefix="true" style:data-style-name="N1" style:family="table-cell" style:name="Cell5" style:parent-style-name="Text_cl">
      <style:table-cell-properties fo:border-bottom="0.75pt solid #000000" fo:border-left="0.75pt solid #000000" fo:border-right="0.75pt solid #000000" fo:border-top="0.7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style="normal" fo:font-weight="normal" fo:text-shadow="none" style:font-relief="none" style:font-style-asian="normal" style:font-style-complex="normal" style:font-weight-asian="normal" style:font-weight-complex="normal" style:text-line-through-style="none" style:text-line-through-type="none" style:text-underline-style="none"/>
    </style:style>
  </office:automatic-styles>
  <office:body>
    <office:spreadsheet>
      <table:table co:columns-count="20" co:grouping-summary-below="true" co:grouping-summary-right="true" co:rows-count="24" co:show-zero-value="true" table:name="Лист1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20" table:style-name="Col1"/>
        <table:table-column table:default-cell-style-name="Cell2" table:number-columns-repeated="16364" table:style-name="Col2"/>
        <table:table-row table:style-name="Row1">
          <table:table-cell table:style-name="Cell3"/>
          <table:table-cell table:number-columns-repeated="8" table:style-name="Cell4"/>
          <table:table-cell office:value-type="string" table:style-name="Cell5">
            <text:p>6</text:p>
          </table:table-cell>
          <table:table-cell table:number-columns-repeated="5" table:style-name="Cell4"/>
          <table:table-cell office:value-type="string" table:style-name="Cell5">
            <text:p>12</text:p>
          </table:table-cell>
          <table:table-cell table:style-name="Cell4"/>
          <table:table-cell office:value-type="string" table:style-name="Cell5">
            <text:p>18</text:p>
          </table:table-cell>
          <table:table-cell table:style-name="Cell4"/>
          <table:table-cell office:value-type="string" table:style-name="Cell5">
            <text:p>21</text:p>
          </table:table-cell>
          <table:table-cell table:number-columns-repeated="16364"/>
        </table:table-row>
        <table:table-row table:style-name="Row1">
          <table:table-cell table:number-columns-repeated="7" table:style-name="Cell4"/>
          <table:table-cell office:value-type="string" table:style-name="Cell5">
            <text:p>5</text:p>
          </table:table-cell>
          <table:table-cell table:number-columns-repeated="4" table:style-name="Cell6"/>
          <table:table-cell table:number-columns-repeated="3"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5" table:style-name="Cell4"/>
          <table:table-cell office:value-type="string" table:style-name="Cell5">
            <text:p>4</text:p>
          </table:table-cell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3" table:style-name="Cell4"/>
          <table:table-cell office:value-type="string" table:style-name="Cell5">
            <text:p>11</text:p>
          </table:table-cell>
          <table:table-cell table:style-name="Cell4"/>
          <table:table-cell office:value-type="string" table:style-name="Cell5">
            <text:p>17</text:p>
          </table:table-cell>
          <table:table-cell table:number-columns-repeated="4" table:style-name="Cell6"/>
          <table:table-cell table:number-columns-repeated="16364"/>
        </table:table-row>
        <table:table-row table:style-name="Row1">
          <table:table-cell table:number-columns-repeated="2" table:style-name="Cell4"/>
          <table:table-cell office:value-type="string" table:style-name="Cell5">
            <text:p>1</text:p>
          </table:table-cell>
          <table:table-cell table:number-columns-repeated="3"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3"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5" table:style-name="Cell4"/>
          <table:table-cell table:style-name="Cell6"/>
          <table:table-cell table:style-name="Cell4"/>
          <table:table-cell table:style-name="Cell6"/>
          <table:table-cell table:number-columns-repeated="3" table:style-name="Cell4"/>
          <table:table-cell office:value-type="string" table:style-name="Cell5">
            <text:p>13</text:p>
          </table:table-cell>
          <table:table-cell table:style-name="Cell4"/>
          <table:table-cell office:value-type="string" table:style-name="Cell5">
            <text:p>15</text:p>
          </table:table-cell>
          <table:table-cell table:number-columns-repeated="2"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16364"/>
        </table:table-row>
        <table:table-row table:style-name="Row1">
          <table:table-cell office:value-type="string" table:style-name="Cell5">
            <text:p>2</text:p>
          </table:table-cell>
          <table:table-cell table:number-columns-repeated="7" table:style-name="Cell6"/>
          <table:table-cell table:style-name="Cell4"/>
          <table:table-cell office:value-type="string" table:style-name="Cell5">
            <text:p>10</text:p>
          </table:table-cell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5"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5" table:style-name="Cell4"/>
          <table:table-cell table:style-name="Cell6"/>
          <table:table-cell table:number-columns-repeated="3"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6" table:style-name="Cell4"/>
          <table:table-cell table:number-columns-repeated="16364"/>
        </table:table-row>
        <table:table-row table:style-name="Row1">
          <table:table-cell office:value-type="string" table:style-name="Cell5">
            <text:p>3</text:p>
          </table:table-cell>
          <table:table-cell table:number-columns-repeated="9" table:style-name="Cell6"/>
          <table:table-cell table:style-name="Cell4"/>
          <table:table-cell office:value-type="string" table:style-name="Cell5">
            <text:p>20</text:p>
          </table:table-cell>
          <table:table-cell table:number-columns-repeated="7" table:style-name="Cell6"/>
          <table:table-cell office:value-type="string" table:style-name="Cell5">
            <text:p>29</text:p>
          </table:table-cell>
          <table:table-cell table:number-columns-repeated="16364"/>
        </table:table-row>
        <table:table-row table:style-name="Row1">
          <table:table-cell table:number-columns-repeated="9" table:style-name="Cell4"/>
          <table:table-cell table:style-name="Cell6"/>
          <table:table-cell table:style-name="Cell4"/>
          <table:table-cell table:style-name="Cell6"/>
          <table:table-cell table:number-columns-repeated="7"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4" table:style-name="Cell4"/>
          <table:table-cell office:value-type="string" table:style-name="Cell5">
            <text:p>7</text:p>
          </table:table-cell>
          <table:table-cell table:number-columns-repeated="10" table:style-name="Cell6"/>
          <table:table-cell table:number-columns-repeated="4"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9" table:style-name="Cell4"/>
          <table:table-cell table:style-name="Cell6"/>
          <table:table-cell table:style-name="Cell4"/>
          <table:table-cell table:style-name="Cell6"/>
          <table:table-cell table:number-columns-repeated="7"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2" table:style-name="Cell4"/>
          <table:table-cell office:value-type="string" table:style-name="Cell5">
            <text:p>8</text:p>
          </table:table-cell>
          <table:table-cell table:number-columns-repeated="2" table:style-name="Cell6"/>
          <table:table-cell office:value-type="string" table:style-name="Cell5">
            <text:p>14</text:p>
          </table:table-cell>
          <table:table-cell table:number-columns-repeated="4" table:style-name="Cell6"/>
          <table:table-cell table:style-name="Cell4"/>
          <table:table-cell office:value-type="string" table:style-name="Cell5">
            <text:p>23</text:p>
          </table:table-cell>
          <table:table-cell table:style-name="Cell6"/>
          <table:table-cell office:value-type="string" table:style-name="Cell5">
            <text:p>26</text:p>
          </table:table-cell>
          <table:table-cell table:number-columns-repeated="3" table:style-name="Cell6"/>
          <table:table-cell table:number-columns-repeated="2" table:style-name="Cell4"/>
          <table:table-cell table:style-name="Cell6"/>
          <table:table-cell table:number-columns-repeated="16364"/>
        </table:table-row>
        <table:table-row table:style-name="Row1">
          <table:table-cell table:number-columns-repeated="5" table:style-name="Cell4"/>
          <table:table-cell table:style-name="Cell6"/>
          <table:table-cell table:number-columns-repeated="7" table:style-name="Cell4"/>
          <table:table-cell table:style-name="Cell6"/>
          <table:table-cell table:number-columns-repeated="6" table:style-name="Cell4"/>
          <table:table-cell table:number-columns-repeated="16364"/>
        </table:table-row>
        <table:table-row table:style-name="Row1">
          <table:table-cell table:style-name="Cell4"/>
          <table:table-cell office:value-type="string" table:style-name="Cell5">
            <text:p>9</text:p>
          </table:table-cell>
          <table:table-cell table:number-columns-repeated="4" table:style-name="Cell6"/>
          <table:table-cell table:number-columns-repeated="3" table:style-name="Cell4"/>
          <table:table-cell office:value-type="string" table:style-name="Cell5">
            <text:p>24</text:p>
          </table:table-cell>
          <table:table-cell table:number-columns-repeated="3" table:style-name="Cell4"/>
          <table:table-cell office:value-type="string" table:style-name="Cell5">
            <text:p>28</text:p>
          </table:table-cell>
          <table:table-cell table:number-columns-repeated="5" table:style-name="Cell6"/>
          <table:table-cell table:style-name="Cell4"/>
          <table:table-cell table:number-columns-repeated="16364"/>
        </table:table-row>
        <table:table-row table:style-name="Row1">
          <table:table-cell table:number-columns-repeated="5" table:style-name="Cell4"/>
          <table:table-cell table:style-name="Cell6"/>
          <table:table-cell table:number-columns-repeated="3" table:style-name="Cell4"/>
          <table:table-cell table:style-name="Cell6"/>
          <table:table-cell table:style-name="Cell4"/>
          <table:table-cell office:value-type="string" table:style-name="Cell5">
            <text:p>27</text:p>
          </table:table-cell>
          <table:table-cell table:style-name="Cell4"/>
          <table:table-cell table:style-name="Cell6"/>
          <table:table-cell table:number-columns-repeated="6" table:style-name="Cell4"/>
          <table:table-cell table:number-columns-repeated="16364"/>
        </table:table-row>
        <table:table-row table:style-name="Row1">
          <table:table-cell table:number-columns-repeated="2" table:style-name="Cell4"/>
          <table:table-cell office:value-type="string" table:style-name="Cell5">
            <text:p>19</text:p>
          </table:table-cell>
          <table:table-cell table:number-columns-repeated="2" table:style-name="Cell4"/>
          <table:table-cell table:style-name="Cell6"/>
          <table:table-cell table:number-columns-repeated="3" table:style-name="Cell4"/>
          <table:table-cell office:value-type="string" table:style-name="Cell5">
            <text:p>25</text:p>
          </table:table-cell>
          <table:table-cell table:number-columns-repeated="5" table:style-name="Cell6"/>
          <table:table-cell office:value-type="string" table:style-name="Cell5">
            <text:p>30</text:p>
          </table:table-cell>
          <table:table-cell table:style-name="Cell4"/>
          <table:table-cell office:value-type="string" table:style-name="Cell5">
            <text:p>31</text:p>
          </table:table-cell>
          <table:table-cell table:number-columns-repeated="2" table:style-name="Cell4"/>
          <table:table-cell table:number-columns-repeated="16364"/>
        </table:table-row>
        <table:table-row table:style-name="Row1">
          <table:table-cell table:style-name="Cell4"/>
          <table:table-cell office:value-type="string" table:style-name="Cell5">
            <text:p>16</text:p>
          </table:table-cell>
          <table:table-cell table:number-columns-repeated="6"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2" table:style-name="Cell4"/>
          <table:table-cell table:number-columns-repeated="16364"/>
        </table:table-row>
        <table:table-row table:style-name="Row1">
          <table:table-cell table:number-columns-repeated="2" table:style-name="Cell4"/>
          <table:table-cell table:style-name="Cell6"/>
          <table:table-cell table:number-columns-repeated="2" table:style-name="Cell4"/>
          <table:table-cell table:style-name="Cell6"/>
          <table:table-cell table:number-columns-repeated="3"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office:value-type="string" table:style-name="Cell5">
            <text:p>32</text:p>
          </table:table-cell>
          <table:table-cell table:number-columns-repeated="3" table:style-name="Cell6"/>
          <table:table-cell table:style-name="Cell4"/>
          <table:table-cell table:number-columns-repeated="16364"/>
        </table:table-row>
        <table:table-row table:style-name="Row1">
          <table:table-cell table:number-columns-repeated="2" table:style-name="Cell4"/>
          <table:table-cell table:style-name="Cell6"/>
          <table:table-cell table:style-name="Cell4"/>
          <table:table-cell office:value-type="string" table:style-name="Cell5">
            <text:p>22</text:p>
          </table:table-cell>
          <table:table-cell table:number-columns-repeated="3"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2" table:style-name="Cell4"/>
          <table:table-cell table:number-columns-repeated="16364"/>
        </table:table-row>
        <table:table-row table:style-name="Row1">
          <table:table-cell table:number-columns-repeated="2" table:style-name="Cell4"/>
          <table:table-cell table:style-name="Cell6"/>
          <table:table-cell table:number-columns-repeated="2" table:style-name="Cell4"/>
          <table:table-cell table:style-name="Cell6"/>
          <table:table-cell table:number-columns-repeated="3" table:style-name="Cell4"/>
          <table:table-cell table:style-name="Cell6"/>
          <table:table-cell table:style-name="Cell4"/>
          <table:table-cell table:style-name="Cell6"/>
          <table:table-cell table:style-name="Cell4"/>
          <table:table-cell table:style-name="Cell6"/>
          <table:table-cell table:number-columns-repeated="3" table:style-name="Cell4"/>
          <table:table-cell table:style-name="Cell6"/>
          <table:table-cell table:number-columns-repeated="2" table:style-name="Cell4"/>
          <table:table-cell table:number-columns-repeated="16364"/>
        </table:table-row>
        <table:table-row table:style-name="Row2">
          <table:table-cell table:number-columns-repeated="19"/>
          <table:table-cell table:style-name="Cell7"/>
          <table:table-cell table:number-columns-repeated="16364"/>
        </table:table-row>
        <table:table-row table:number-rows-repeated="2" table:style-name="Row2">
          <table:table-cell table:number-columns-repeated="16384"/>
        </table:table-row>
        <table:table-row table:style-name="Row2">
          <table:table-cell table:number-columns-repeated="15"/>
          <table:table-cell table:style-name="Cell7"/>
          <table:table-cell table:number-columns-repeated="4"/>
          <table:table-cell table:number-columns-repeated="16364"/>
        </table:table-row>
        <table:table-row table:number-rows-repeated="1048552" table:style-name="Row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ans" svg:font-family="PT Astra San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style co:named-style-uuid="1abc105a-9249-4b39-9461-c61942d826da" style:display-name="Heading 1" style:family="table" style:name="Heading_1" style:parent-style-name="default">
      <co:linked-style style-name="Heading_1_cl"/>
      <style:table-properties table:align="left" table:display="true"/>
    </style:style>
    <style:style co:named-style-uuid="1abc105a-9249-4b39-9461-c61942d826da" style:display-name="Heading 1" style:family="table-cell" style:name="Heading_1_cl" style:parent-style-name="default_cl">
      <co:linked-style style-name="Heading_1"/>
      <style:text-properties fo:color="#000000" fo:font-size="18pt" fo:font-style="normal" fo:font-weight="normal" style:font-size-asian="18pt" style:font-size-complex="18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co:named-style-uuid="1cca4c6f-af4d-4f7c-804f-03ad66a4d939" style:display-name="Default cell" style:family="table" style:name="Default_cell">
      <co:linked-style style-name="Default_cell_cl"/>
      <style:table-properties table:align="left" table:display="true"/>
    </style:style>
    <style:style co:is-default-style="true" co:named-style-uuid="1cca4c6f-af4d-4f7c-804f-03ad66a4d939" style:display-name="Default cell" style:family="table-cell" style:name="Default_cell_cl">
      <co:linked-style style-name="Default_cell"/>
      <style:table-cell-properties fo:wrap-option="wrap" style:vertical-align="top"/>
      <style:text-properties fo:font-family="PT Astra Sans" fo:font-size="12pt" style:font-name="PT Astra Sans" style:font-size-asian="12pt" style:font-size-complex="12pt"/>
    </style:style>
    <style:style co:named-style-uuid="1ed633d5-c11c-4b5b-aa74-183c07a3ff51" style:display-name="Warning" style:family="table" style:name="Warning" style:parent-style-name="Status">
      <co:linked-style style-name="Warning_cl"/>
      <style:table-properties table:align="left" table:display="true"/>
    </style:style>
    <style:style co:named-style-uuid="1ed633d5-c11c-4b5b-aa74-183c07a3ff51" style:display-name="Warning" style:family="table-cell" style:name="Warning_cl" style:parent-style-name="Status_cl">
      <co:linked-style style-name="Warning"/>
      <style:text-properties fo:color="#CC00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CC0000FF</rgba>
          </value>
        </co:theme-color>
      </style:text-properties>
    </style:style>
    <style:style co:named-style-uuid="267a5e25-4975-44ec-b38e-1deb086b5c8a" style:display-name="Footnote" style:family="table" style:name="Footnote" style:parent-style-name="Text">
      <co:linked-style style-name="Footnote_cl"/>
      <style:table-properties table:align="left" table:display="true"/>
    </style:style>
    <style:style co:named-style-uuid="267a5e25-4975-44ec-b38e-1deb086b5c8a" style:display-name="Footnote" style:family="table-cell" style:name="Footnote_cl" style:parent-style-name="Text_cl">
      <co:linked-style style-name="Footnote"/>
      <style:text-properties fo:color="#808080" fo:font-size="10pt" fo:font-style="italic" fo:font-weight="normal" style:font-size-asian="10pt" style:font-size-complex="10pt" style:font-style-asian="italic" style:font-style-complex="italic" style:font-weight-asian="normal" style:font-weight-complex="normal">
        <co:theme-color>
          <value>
            <rgba>808080FF</rgba>
          </value>
        </co:theme-color>
      </style:text-properties>
    </style:style>
    <style:style co:named-style-uuid="31132e96-725c-40e1-b791-799527fea834" style:display-name="Accent 3" style:family="table" style:name="Accent_3" style:parent-style-name="Accent">
      <co:linked-style style-name="Accent_3_cl"/>
      <style:table-properties table:align="left" table:display="true"/>
    </style:style>
    <style:style co:named-style-uuid="31132e96-725c-40e1-b791-799527fea834" style:display-name="Accent 3" style:family="table-cell" style:name="Accent_3_cl" style:parent-style-name="Accent_cl">
      <co:linked-style style-name="Accent_3"/>
      <style:table-cell-properties fo:background-color="#DDDDDD">
        <co:background-theme-color>
          <value>
            <rgba>DDDDDDFF</rgba>
          </value>
        </co:background-theme-color>
      </style:table-cell-properties>
    </style:style>
    <style:style co:named-style-uuid="33393cff-61b1-4f9f-8fd6-ac805121e3a9" style:display-name="Neutral" style:family="table" style:name="Neutral" style:parent-style-name="Status">
      <co:linked-style style-name="Neutral_cl"/>
      <style:table-properties table:align="left" table:display="true"/>
    </style:style>
    <style:style co:named-style-uuid="33393cff-61b1-4f9f-8fd6-ac805121e3a9" style:display-name="Neutral" style:family="table-cell" style:name="Neutral_cl" style:parent-style-name="Status_cl">
      <co:linked-style style-name="Neutral"/>
      <style:table-cell-properties fo:background-color="#FFFFCC">
        <co:background-theme-color>
          <value>
            <rgba>FFFFCCFF</rgba>
          </value>
        </co:background-theme-color>
      </style:table-cell-properties>
      <style:text-properties fo:color="#9966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996600FF</rgba>
          </value>
        </co:theme-color>
      </style:text-properties>
    </style:style>
    <style:style co:named-style-uuid="3d8eaafd-c0e5-4be4-82b4-408323d6cfc1" style:display-name="Accent 1" style:family="table" style:name="Accent_1" style:parent-style-name="Accent">
      <co:linked-style style-name="Accent_1_cl"/>
      <style:table-properties table:align="left" table:display="true"/>
    </style:style>
    <style:style co:named-style-uuid="3d8eaafd-c0e5-4be4-82b4-408323d6cfc1" style:display-name="Accent 1" style:family="table-cell" style:name="Accent_1_cl" style:parent-style-name="Accent_cl">
      <co:linked-style style-name="Accent_1"/>
      <style:table-cell-properties fo:background-color="#000000">
        <co:background-theme-color>
          <value>
            <rgba>000000FF</rgba>
          </value>
        </co:background-theme-color>
      </style:table-cell-properties>
      <style:text-properties fo:color="#FFFFFF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co:named-style-uuid="3e90fb18-a89f-4747-b2e1-dc51b76e3ec5" style:display-name="Result" style:family="table" style:name="Result" style:parent-style-name="default">
      <co:linked-style style-name="Result_cl"/>
      <style:table-properties table:align="left" table:display="true"/>
    </style:style>
    <style:style co:named-style-uuid="3e90fb18-a89f-4747-b2e1-dc51b76e3ec5" style:display-name="Result" style:family="table-cell" style:name="Result_cl" style:parent-style-name="default_cl">
      <co:linked-style style-name="Result"/>
      <style:table-cell-properties fo:wrap-option="no-wrap"/>
      <style:text-properties fo:font-style="italic" fo:font-weight="bold" style:font-style-asian="italic" style:font-style-complex="italic" style:font-weight-asian="bold" style:font-weight-complex="bold" style:text-underline-style="solid"/>
    </style:style>
    <style:style co:named-style-uuid="53ac39ab-ca3f-45ec-b29f-9a2df7d22f50" style:display-name="Accent" style:family="table" style:name="Accent" style:parent-style-name="default">
      <co:linked-style style-name="Accent_cl"/>
      <style:table-properties table:align="left" table:display="true"/>
    </style:style>
    <style:style co:named-style-uuid="53ac39ab-ca3f-45ec-b29f-9a2df7d22f50" style:display-name="Accent" style:family="table-cell" style:name="Accent_cl" style:parent-style-name="default_cl">
      <co:linked-style style-name="Accent"/>
      <style:text-properties fo:color="#000000" fo:font-size="10pt" fo:font-style="normal" fo:font-weight="bold" style:font-size-asian="10pt" style:font-size-complex="10pt" style:font-style-asian="normal" style:font-style-complex="normal" style:font-weight-asian="bold" style:font-weight-complex="bold">
        <co:theme-color>
          <value>
            <rgba>000000FF</rgba>
          </value>
        </co:theme-color>
      </style:text-properties>
    </style:style>
    <style:style co:named-style-uuid="63516805-6dda-4c3f-b00c-d50851faa75d" style:display-name="Good" style:family="table" style:name="Good" style:parent-style-name="Status">
      <co:linked-style style-name="Good_cl"/>
      <style:table-properties table:align="left" table:display="true"/>
    </style:style>
    <style:style co:named-style-uuid="63516805-6dda-4c3f-b00c-d50851faa75d" style:display-name="Good" style:family="table-cell" style:name="Good_cl" style:parent-style-name="Status_cl">
      <co:linked-style style-name="Good"/>
      <style:table-cell-properties fo:background-color="#CCFFCC">
        <co:background-theme-color>
          <value>
            <rgba>CCFFCCFF</rgba>
          </value>
        </co:background-theme-color>
      </style:table-cell-properties>
      <style:text-properties fo:color="#0066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006600FF</rgba>
          </value>
        </co:theme-color>
      </style:text-properties>
    </style:style>
    <style:style co:named-style-uuid="662399a0-99bb-48b9-8d65-d9a350d0fc1f" style:display-name="Text" style:family="table" style:name="Text" style:parent-style-name="default">
      <co:linked-style style-name="Text_cl"/>
      <style:table-properties table:align="left" table:display="true"/>
    </style:style>
    <style:style co:named-style-uuid="662399a0-99bb-48b9-8d65-d9a350d0fc1f" style:display-name="Text" style:family="table-cell" style:name="Text_cl" style:parent-style-name="default_cl">
      <co:linked-style style-name="Text"/>
    </style:style>
    <style:style co:named-style-uuid="8a3f1c3d-4484-4d96-9666-6be2c53c71b6" style:display-name="Hyperlink" style:family="table" style:name="Hyperlink" style:parent-style-name="Text">
      <co:linked-style style-name="Hyperlink_cl"/>
      <style:table-properties table:align="left" table:display="true"/>
    </style:style>
    <style:style co:named-style-uuid="8a3f1c3d-4484-4d96-9666-6be2c53c71b6" style:display-name="Hyperlink" style:family="table-cell" style:name="Hyperlink_cl" style:parent-style-name="Text_cl">
      <co:linked-style style-name="Hyperlink"/>
      <style:text-properties fo:color="#0000EE" fo:font-size="10pt" fo:font-style="normal" fo:font-weight="normal" style:font-size-asian="10pt" style:font-size-complex="10pt" style:font-style-asian="normal" style:font-style-complex="normal" style:font-weight-asian="normal" style:font-weight-complex="normal" style:text-underline-color="font-color" style:text-underline-style="solid">
        <co:theme-color>
          <value>
            <rgba>0000EEFF</rgba>
          </value>
        </co:theme-color>
      </style:text-properties>
    </style:style>
    <style:style co:named-style-uuid="9568b3a1-3915-44d7-bb1b-608991d27b53" style:display-name="Heading" style:family="table" style:name="Heading" style:parent-style-name="default">
      <co:linked-style style-name="Heading_cl"/>
      <style:table-properties table:align="left" table:display="true"/>
    </style:style>
    <style:style co:named-style-uuid="9568b3a1-3915-44d7-bb1b-608991d27b53" style:display-name="Heading" style:family="table-cell" style:name="Heading_cl" style:parent-style-name="default_cl">
      <co:linked-style style-name="Heading"/>
      <style:table-cell-properties style:repeat-content="false" style:text-align-source="fix" style:vertical-align="middle"/>
      <style:paragraph-properties fo:orphans="2" fo:text-align="center" fo:widows="2"/>
      <style:text-properties fo:font-weight="bold" style:font-weight-asian="bold" style:font-weight-complex="bold"/>
    </style:style>
    <style:style co:named-style-uuid="975242e7-c9f6-4e14-95bd-f316bee3fd48" style:display-name="default" style:family="table" style:name="default" style:parent-style-name="Default_cell">
      <co:linked-style style-name="default_cl"/>
      <style:table-properties table:align="left" table:display="true"/>
    </style:style>
    <style:style co:named-style-uuid="975242e7-c9f6-4e14-95bd-f316bee3fd48" style:display-name="default" style:family="table-cell" style:name="default_cl" style:parent-style-name="Default_cell_cl">
      <co:linked-style style-name="default"/>
      <style:table-cell-properties fo:wrap-option="wrap" style:vertical-align="top"/>
      <style:text-properties fo:font-family="PT Astra Sans" fo:font-size="12pt" style:font-name="PT Astra Sans" style:font-size-asian="12pt" style:font-size-complex="12pt"/>
    </style:style>
    <style:style co:named-style-uuid="98be0642-7e9e-48c2-9166-8ef8c45e6264" style:display-name="Accent 2" style:family="table" style:name="Accent_2" style:parent-style-name="Accent">
      <co:linked-style style-name="Accent_2_cl"/>
      <style:table-properties table:align="left" table:display="true"/>
    </style:style>
    <style:style co:named-style-uuid="98be0642-7e9e-48c2-9166-8ef8c45e6264" style:display-name="Accent 2" style:family="table-cell" style:name="Accent_2_cl" style:parent-style-name="Accent_cl">
      <co:linked-style style-name="Accent_2"/>
      <style:table-cell-properties fo:background-color="#808080">
        <co:background-theme-color>
          <value>
            <rgba>808080FF</rgba>
          </value>
        </co:background-theme-color>
      </style:table-cell-properties>
      <style:text-properties fo:color="#FFFFFF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co:named-style-uuid="9bbe87f5-58b4-4015-8171-7efdb9b23f84" style:display-name="Heading 2" style:family="table" style:name="Heading_2" style:parent-style-name="default">
      <co:linked-style style-name="Heading_2_cl"/>
      <style:table-properties table:align="left" table:display="true"/>
    </style:style>
    <style:style co:named-style-uuid="9bbe87f5-58b4-4015-8171-7efdb9b23f84" style:display-name="Heading 2" style:family="table-cell" style:name="Heading_2_cl" style:parent-style-name="default_cl">
      <co:linked-style style-name="Heading_2"/>
      <style:text-properties fo:color="#000000" fo:font-size="12pt" fo:font-style="normal" fo:font-weight="normal" style:font-size-asian="12pt" style:font-size-complex="12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co:named-style-uuid="ae93830e-4e59-4075-8da5-0fc3f7bb34bc" style:display-name="Status" style:family="table" style:name="Status" style:parent-style-name="default">
      <co:linked-style style-name="Status_cl"/>
      <style:table-properties table:align="left" table:display="true"/>
    </style:style>
    <style:style co:named-style-uuid="ae93830e-4e59-4075-8da5-0fc3f7bb34bc" style:display-name="Status" style:family="table-cell" style:name="Status_cl" style:parent-style-name="default_cl">
      <co:linked-style style-name="Status"/>
    </style:style>
    <style:style co:named-style-uuid="c2a51a57-a459-4227-b199-7711ec4315c8" style:display-name="Bad" style:family="table" style:name="Bad" style:parent-style-name="Status">
      <co:linked-style style-name="Bad_cl"/>
      <style:table-properties table:align="left" table:display="true"/>
    </style:style>
    <style:style co:named-style-uuid="c2a51a57-a459-4227-b199-7711ec4315c8" style:display-name="Bad" style:family="table-cell" style:name="Bad_cl" style:parent-style-name="Status_cl">
      <co:linked-style style-name="Bad"/>
      <style:table-cell-properties fo:background-color="#FFCCCC">
        <co:background-theme-color>
          <value>
            <rgba>FFCCCCFF</rgba>
          </value>
        </co:background-theme-color>
      </style:table-cell-properties>
      <style:text-properties fo:color="#CC00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CC0000FF</rgba>
          </value>
        </co:theme-color>
      </style:text-properties>
    </style:style>
    <style:style co:named-style-uuid="c2bc711d-7bf8-40b7-b9d8-5d2fcf86956e" style:display-name="Note" style:family="table" style:name="Note" style:parent-style-name="Text">
      <co:linked-style style-name="Note_cl"/>
      <style:table-properties table:align="left" table:display="true"/>
    </style:style>
    <style:style co:named-style-uuid="c2bc711d-7bf8-40b7-b9d8-5d2fcf86956e" style:display-name="Note" style:family="table-cell" style:name="Note_cl" style:parent-style-name="Text_cl">
      <co:linked-style style-name="Note"/>
      <style:table-cell-properties fo:background-color="#FFFFCC" fo:border-bottom="0.75pt solid #808080" fo:border-left="0.75pt solid #808080" fo:border-right="0.75pt solid #808080" fo:border-top="0.75pt solid #808080" style:diagonal-bl-tr="none" style:diagonal-tl-br="none">
        <co:background-theme-color>
          <value>
            <rgba>FFFFCCFF</rgba>
          </value>
        </co:background-theme-color>
        <co:border-left-theme-color>
          <value>
            <rgba>808080FF</rgba>
          </value>
        </co:border-left-theme-color>
        <co:border-right-theme-color>
          <value>
            <rgba>808080FF</rgba>
          </value>
        </co:border-right-theme-color>
        <co:border-top-theme-color>
          <value>
            <rgba>808080FF</rgba>
          </value>
        </co:border-top-theme-color>
        <co:border-bottom-theme-color>
          <value>
            <rgba>808080FF</rgba>
          </value>
        </co:border-bottom-theme-color>
      </style:table-cell-properties>
      <style:text-properties fo:color="#333333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333333FF</rgba>
          </value>
        </co:theme-color>
      </style:text-properties>
    </style:style>
    <style:style co:named-style-uuid="e2c250e6-4ec1-4bb7-bb4e-2868c0da7df0" style:display-name="Error" style:family="table" style:name="Error" style:parent-style-name="Status">
      <co:linked-style style-name="Error_cl"/>
      <style:table-properties table:align="left" table:display="true"/>
    </style:style>
    <style:style co:named-style-uuid="e2c250e6-4ec1-4bb7-bb4e-2868c0da7df0" style:display-name="Error" style:family="table-cell" style:name="Error_cl" style:parent-style-name="Status_cl">
      <co:linked-style style-name="Error"/>
      <style:table-cell-properties fo:background-color="#CC0000">
        <co:background-theme-color>
          <value>
            <rgba>CC0000FF</rgba>
          </value>
        </co:background-theme-color>
      </style:table-cell-properties>
      <style:text-properties fo:color="#FFFFFF" fo:font-size="10pt" fo:font-style="normal" fo:font-weight="bold" style:font-size-asian="10pt" style:font-size-complex="10pt" style:font-style-asian="normal" style:font-style-complex="normal" style:font-weight-asian="bold" style:font-weight-complex="bold">
        <co:theme-color>
          <value>
            <rgba>FFFFFFFF</rgba>
          </value>
        </co:theme-color>
      </style:text-properties>
    </style:style>
    <text:notes-configuration co:endnotes-position="document-end" style:num-format="i" text:note-class="endnote" text:start-numbering-at="document"/>
    <number:number-style co:extendedFormatCode="General" style:name="N1">
      <number:number number:min-integer-digits="1"/>
    </number:number-style>
  </office:styles>
  <office:automatic-styles>
    <style:page-layout style:name="PM1">
      <style:page-layout-properties fo:margin-bottom="28.3465pt" fo:margin-left="28.3465pt" fo:margin-right="28.3465pt" fo:margin-top="28.3465pt"/>
      <style:header-style>
        <style:header-footer-properties fo:margin-bottom="0pt" fo:min-height="0.196851in"/>
      </style:header-style>
      <style:footer-style>
        <style:header-footer-properties fo:margin-top="0pt" fo:min-height="0.196851in"/>
      </style:footer-style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Linux/38-1384.1107.10199.1019.1@18975027e3ee4b688e27426d4a78178cb841a344</meta:generator>
    <meta:creation-date>2026-05-06T11:24:06</meta:creation-date>
    <dc:date>2026-05-06T11:44:27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