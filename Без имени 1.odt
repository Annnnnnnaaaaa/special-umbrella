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Pictures/1000000000000410000022249D39BA76.jpg" manifest:media-type="image/jpeg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Изображение1" text:anchor-type="char" svg:width="4.995cm" svg:height="42cm" draw:z-index="0"><draw:image xlink:href="Pictures/1000000000000410000022249D39BA7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11:54:16.757422128</meta:creation-date>
    <dc:title>Default</dc:title>
    <meta:editing-cycles>2</meta:editing-cycles>
    <meta:editing-duration>PT5M16S</meta:editing-duration>
    <meta:generator>LibreOffice/7.6.7.2$Linux_X86_64 LibreOffice_project/60$Build-2</meta:generator>
    <dc:date>2026-05-16T11:59:32.322054832</dc:date>
    <meta:document-statistic meta:table-count="1" meta:image-count="1" meta:object-count="0" meta:page-count="1" meta:paragraph-count="10" meta:word-count="23" meta:character-count="86" meta:non-whitespace-character-count="73"/>
  </office:meta>
</office:document-meta>
</file>